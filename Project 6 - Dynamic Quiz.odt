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>
      <style:text-properties officeooo:rsid="001fc05e" officeooo:paragraph-rsid="001fc05e"/>
    </style:style>
    <style:style style:name="T1" style:family="text">
      <style:text-properties officeooo:rsid="001f13c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lgorithm</text:h>
      <text:list xml:id="list592302164" text:style-name="L2">
        <text:list-item>
          <text:p text:style-name="P4">Start the program and load the question bank containing Easy, Medium, and Hard questions with marks and negative marks. </text:p>
        </text:list-item>
        <text:list-item>
          <text:p text:style-name="P4">The program starts with <text:span text:style-name="Strong_20_Emphasis">Easy difficulty first</text:span>, then moves to <text:span text:style-name="Strong_20_Emphasis">Medium</text:span>, then <text:span text:style-name="Strong_20_Emphasis">Hard</text:span>. </text:p>
        </text:list-item>
        <text:list-item>
          <text:p text:style-name="P4">For each difficulty level: </text:p>
          <text:list>
            <text:list-item>
              <text:p text:style-name="P4">Shuffle the questions using <text:span text:style-name="Source_20_Text">pseudo_shuffle()</text:span>. </text:p>
            </text:list-item>
            <text:list-item>
              <text:p text:style-name="P4">Initialize total score to 0 for that quiz level. </text:p>
            </text:list-item>
            <text:list-item>
              <text:p text:style-name="P4">Display each question with 4 options (a, b, c, d). </text:p>
            </text:list-item>
          </text:list>
        </text:list-item>
        <text:list-item>
          <text:p text:style-name="P4">Take user input for each question. </text:p>
        </text:list-item>
        <text:list-item>
          <text:p text:style-name="P4">Check the answer: </text:p>
          <text:list>
            <text:list-item>
              <text:p text:style-name="P4">If correct → add marks (Easy: +10, Medium: +20, Hard: +30) </text:p>
            </text:list-item>
            <text:list-item>
              <text:p text:style-name="P4">If wrong → subtract negative marks (Easy: -5, Medium: -10, Hard: -15) </text:p>
            </text:list-item>
            <text:list-item>
              <text:p text:style-name="P4">If invalid → no marks change </text:p>
            </text:list-item>
          </text:list>
        </text:list-item>
        <text:list-item>
          <text:p text:style-name="P4">Store each question’s result (answer, correctness, marks). </text:p>
        </text:list-item>
        <text:list-item>
          <text:p text:style-name="P4">After all questions in a difficulty are completed: </text:p>
          <text:list>
            <text:list-item>
              <text:p text:style-name="P4">Display final score </text:p>
            </text:list-item>
            <text:list-item>
              <text:p text:style-name="P4">Display detailed results </text:p>
            </text:list-item>
          </text:list>
        </text:list-item>
        <text:list-item>
          <text:p text:style-name="P4">Move automatically to the next difficulty level. </text:p>
        </text:list-item>
        <text:list-item>
          <text:p text:style-name="P4">Repeat steps until all difficulties are completed. </text:p>
        </text:list-item>
        <text:list-item>
          <text:p text:style-name="P3">End program. </text:p>
        </text:list-item>
      </text:list>
      <text:p text:style-name="Horizontal_20_Line"/>
      <text:p text:style-name="P5">Flow chart</text:p>
      <text:p text:style-name="P5">Start</text:p>
      <text:p text:style-name="P5"><text:s text:c="2"/>↓</text:p>
      <text:p text:style-name="P5">Load Question Bank</text:p>
      <text:p text:style-name="P5"><text:s text:c="2"/>↓</text:p>
      <text:p text:style-name="P5">For Each Difficulty (Easy → Medium → Hard)</text:p>
      <text:p text:style-name="P5"><text:s text:c="2"/>↓</text:p>
      <text:p text:style-name="P5">Pseudo Shuffle Questions</text:p>
      <text:p text:style-name="P5"><text:s text:c="2"/>↓</text:p>
      <text:p text:style-name="P5">For Each Question</text:p>
      <text:p text:style-name="P5"><text:s text:c="2"/>↓</text:p>
      <text:p text:style-name="P5">Get User Input</text:p>
      <text:p text:style-name="P5"><text:s text:c="2"/>↓</text:p>
      <text:p text:style-name="P5">Validate Answer</text:p>
      <text:p text:style-name="P5"><text:soft-page-break/><text:s text:c="2"/>↓</text:p>
      <text:p text:style-name="P5">Correct?</text:p>
      <text:p text:style-name="P5"><text:s text:c="2"/>↓ Yes → Add Marks</text:p>
      <text:p text:style-name="P5"><text:s text:c="2"/>↓ No <text:s/>→ Subtract Marks</text:p>
      <text:p text:style-name="P5"><text:s text:c="2"/>↓ Invalid → No Change</text:p>
      <text:p text:style-name="P5"><text:s text:c="2"/>↓</text:p>
      <text:p text:style-name="P5">Store Result</text:p>
      <text:p text:style-name="P5"><text:s text:c="2"/>↓</text:p>
      <text:p text:style-name="P5">More Questions in This Difficulty?</text:p>
      <text:p text:style-name="P5"><text:s text:c="2"/>↓ Yes → (loop back to For Each Question)</text:p>
      <text:p text:style-name="P5"><text:s text:c="2"/>↓ No</text:p>
      <text:p text:style-name="P5"><text:s text:c="2"/>↓</text:p>
      <text:p text:style-name="P5">Print Detailed Results</text:p>
      <text:p text:style-name="P5"><text:s text:c="2"/>↓</text:p>
      <text:p text:style-name="P5">Next Difficulty</text:p>
      <text:p text:style-name="P5"><text:s text:c="2"/>↓</text:p>
      <text:p text:style-name="P5">All Difficulties Done?</text:p>
      <text:p text:style-name="P5"><text:s text:c="2"/>↓ No → (loop back to For Each Difficulty)</text:p>
      <text:p text:style-name="P5"><text:s text:c="2"/>↓ Yes</text:p>
      <text:p text:style-name="P5"><text:s text:c="2"/>↓</text:p>
      <text:p text:style-name="P5">End</text:p>
      <text:p text:style-name="Standard"/>
      <text:p text:style-name="Standard"><text:s text:c="3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4:24:15.147267564</meta:creation-date>
    <dc:date>2026-06-19T15:25:53.121798607</dc:date>
    <meta:editing-duration>PT1M8S</meta:editing-duration>
    <meta:editing-cycles>1</meta:editing-cycles>
    <meta:document-statistic meta:table-count="0" meta:image-count="0" meta:object-count="0" meta:page-count="2" meta:paragraph-count="55" meta:word-count="246" meta:character-count="1357" meta:non-whitespace-character-count="1121"/>
    <meta:generator>LibreOffice/7.3.7.2$Linux_X86_64 LibreOffice_project/30$Build-2</meta:generator>
  </office:meta>
</office:document-meta>
</file>